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15.607cm"/>
    </style:style>
    <style:style style:name="co5" style:family="table-column">
      <style:table-column-properties fo:break-before="auto" style:column-width="2.2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="0.74pt solid #000000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text-underline-style="none" style:font-style-asian="italic" style:font-style-complex="italic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text-underline-style="none" style:font-style-asian="italic" style:font-style-complex="italic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style="italic" style:text-underline-style="none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4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oglio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13"/>
        <table:table-column table:style-name="co6" table:default-cell-style-name="ce15"/>
        <table:table-column table:style-name="co7" table:default-cell-style-name="ce35"/>
        <table:table-column table:style-name="co7" table:default-cell-style-name="ce19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2">
            <text:p>OPERATION CODE DESCRIPTION TABLE</text:p>
          </table:table-cell>
          <table:covered-table-cell table:number-columns-repeated="2" table:style-name="Default"/>
          <table:covered-table-cell/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number-columns-repeated="3" table:style-name="Default"/>
          <table:covered-table-cell/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op_code</text:p>
          </table:table-cell>
          <table:table-cell table:style-name="ce7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operation description</text:p>
          </table:table-cell>
          <table:table-cell table:style-name="ce11" office:value-type="string" calcext:value-type="string" table:number-columns-spanned="2" table:number-rows-spanned="1">
            <text:p>data</text:p>
          </table:table-cell>
          <table:covered-table-cell table:style-name="ce3"/>
          <table:table-cell table:style-name="ce33" office:value-type="string" calcext:value-type="string">
            <text:p>msg structure</text:p>
          </table:table-cell>
          <table:table-cell table:style-name="ce17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register with a library</text:p>
          </table:table-cell>
          <table:table-cell table:style-name="ce12" office:value-type="string" calcext:value-type="string">
            <text:p>user_id</text:p>
          </table:table-cell>
          <table:table-cell/>
          <table:table-cell table:style-name="ce34" table:formula="of:=[.A4] &amp; IF([.E4]&lt;&gt;&quot;&quot;; &quot; &lt;&quot; &amp; [.E4] &amp; &quot;&gt;&quot;; &quot;&quot;) &amp; IF([.F4]&lt;&gt;&quot;&quot;; &quot; &lt;&quot; &amp; [.F4] &amp; &quot;&gt;&quot;; &quot;&quot;)" office:value-type="string" office:string-value="0 &lt;user_id&gt;" calcext:value-type="string">
            <text:p>0 &lt;user_id&gt;</text:p>
          </table:table-cell>
          <table:table-cell table:style-name="ce18"/>
          <table:table-cell/>
          <table:table-cell table:style-name="ce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earch for a book in a library</text:p>
          </table:table-cell>
          <table:table-cell/>
          <table:table-cell office:value-type="string" calcext:value-type="string">
            <text:p>book_hash</text:p>
          </table:table-cell>
          <table:table-cell table:formula="of:=[.A5] &amp; IF([.E5]&lt;&gt;&quot;&quot;; &quot; &lt;&quot; &amp; [.E5] &amp; &quot;&gt;&quot;; &quot;&quot;) &amp; IF([.F5]&lt;&gt;&quot;&quot;; &quot; &lt;&quot; &amp; [.F5] &amp; &quot;&gt;&quot;; &quot;&quot;)" office:value-type="string" office:string-value="1 &lt;book_hash&gt;" calcext:value-type="string">
            <text:p>1 &lt;book_hash&gt;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rrow a book from a librar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book_hash</text:p>
          </table:table-cell>
          <table:table-cell table:formula="of:=[.A6] &amp; IF([.E6]&lt;&gt;&quot;&quot;; &quot; &lt;&quot; &amp; [.E6] &amp; &quot;&gt;&quot;; &quot;&quot;) &amp; IF([.F6]&lt;&gt;&quot;&quot;; &quot; &lt;&quot; &amp; [.F6] &amp; &quot;&gt;&quot;; &quot;&quot;)" office:value-type="string" office:string-value="2 &lt;user_id&gt; &lt;book_hash&gt;" calcext:value-type="string">
            <text:p>2 &lt;user_id&gt; &lt;book_hash&gt;</text:p>
          </table:table-cell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library</text:p>
          </table:table-cell>
          <table:table-cell table:style-name="ce10" office:value-type="string" calcext:value-type="string">
            <text:p>return a book to a library</text:p>
          </table:table-cell>
          <table:table-cell table:style-name="ce14" office:value-type="string" calcext:value-type="string">
            <text:p>user_id</text:p>
          </table:table-cell>
          <table:table-cell table:style-name="ce16" office:value-type="string" calcext:value-type="string">
            <text:p>book_hash</text:p>
          </table:table-cell>
          <table:table-cell table:style-name="ce36" table:formula="of:=[.A7] &amp; IF([.E7]&lt;&gt;&quot;&quot;; &quot; &lt;&quot; &amp; [.E7] &amp; &quot;&gt;&quot;; &quot;&quot;) &amp; IF([.F7]&lt;&gt;&quot;&quot;; &quot; &lt;&quot; &amp; [.F7] &amp; &quot;&gt;&quot;; &quot;&quot;)" office:value-type="string" office:string-value="3 &lt;user_id&gt; &lt;book_hash&gt;" calcext:value-type="string">
            <text:p>3 &lt;user_id&gt; &lt;book_hash&gt;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ook available: the library can lend the book to the user and mark it as unavailable.</text:p>
          </table:table-cell>
          <table:table-cell table:number-columns-repeated="2"/>
          <table:table-cell table:formula="of:=[.A8] &amp; IF([.E8]&lt;&gt;&quot;&quot;; &quot; &lt;&quot; &amp; [.E8] &amp; &quot;&gt;&quot;; &quot;&quot;) &amp; IF([.F8]&lt;&gt;&quot;&quot;; &quot; &lt;&quot; &amp; [.F8] &amp; &quot;&gt;&quot;; &quot;&quot;)" office:value-type="string" office:string-value="4" calcext:value-type="string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ook lent to someone else (either in the library or in another library)</text:p>
          </table:table-cell>
          <table:table-cell table:number-columns-repeated="2"/>
          <table:table-cell table:formula="of:=[.A9] &amp; IF([.E9]&lt;&gt;&quot;&quot;; &quot; &lt;&quot; &amp; [.E9] &amp; &quot;&gt;&quot;; &quot;&quot;) &amp; IF([.F9]&lt;&gt;&quot;&quot;; &quot; &lt;&quot; &amp; [.F9] &amp; &quot;&gt;&quot;; &quot;&quot;)" office:value-type="string" office:string-value="5" calcext:value-type="string">
            <text:p>5</text:p>
          </table:table-cell>
          <table:table-cell office:value-type="string" calcext:value-type="string">
            <text:p>BOOK_UNAVAILAB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ook not found in own catalog, but available elsewhere</text:p>
          </table:table-cell>
          <table:table-cell table:number-columns-repeated="2"/>
          <table:table-cell table:formula="of:=[.A10] &amp; IF([.E10]&lt;&gt;&quot;&quot;; &quot; &lt;&quot; &amp; [.E10] &amp; &quot;&gt;&quot;; &quot;&quot;) &amp; IF([.F10]&lt;&gt;&quot;&quot;; &quot; &lt;&quot; &amp; [.F10] &amp; &quot;&gt;&quot;; &quot;&quot;)" office:value-type="string" office:string-value="6" calcext:value-type="string">
            <text:p>6</text:p>
          </table:table-cell>
          <table:table-cell office:value-type="string" calcext:value-type="string">
            <text:p>BOOK_NOT_FOUND_HER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ook found in no catalog at all</text:p>
          </table:table-cell>
          <table:table-cell table:number-columns-repeated="2"/>
          <table:table-cell table:formula="of:=[.A11] &amp; IF([.E11]&lt;&gt;&quot;&quot;; &quot; &lt;&quot; &amp; [.E11] &amp; &quot;&gt;&quot;; &quot;&quot;) &amp; IF([.F11]&lt;&gt;&quot;&quot;; &quot; &lt;&quot; &amp; [.F11] &amp; &quot;&gt;&quot;; &quot;&quot;)" office:value-type="string" office:string-value="7" calcext:value-type="string">
            <text:p>7</text:p>
          </table:table-cell>
          <table:table-cell office:value-type="string" calcext:value-type="string">
            <text:p>BOOK_NOT_FOUN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 tries to borrow a book while they already have one borrowed</text:p>
          </table:table-cell>
          <table:table-cell table:number-columns-repeated="2"/>
          <table:table-cell table:formula="of:=[.A12] &amp; IF([.E12]&lt;&gt;&quot;&quot;; &quot; &lt;&quot; &amp; [.E12] &amp; &quot;&gt;&quot;; &quot;&quot;) &amp; IF([.F12]&lt;&gt;&quot;&quot;; &quot; &lt;&quot; &amp; [.F12] &amp; &quot;&gt;&quot;; &quot;&quot;)" office:value-type="string" office:string-value="8" calcext:value-type="string">
            <text:p>8</text:p>
          </table:table-cell>
          <table:table-cell office:value-type="string" calcext:value-type="string">
            <text:p>BOOK_CA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 tries to borrow a book without registering first</text:p>
          </table:table-cell>
          <table:table-cell table:number-columns-repeated="2"/>
          <table:table-cell table:formula="of:=[.A13] &amp; IF([.E13]&lt;&gt;&quot;&quot;; &quot; &lt;&quot; &amp; [.E13] &amp; &quot;&gt;&quot;; &quot;&quot;) &amp; IF([.F13]&lt;&gt;&quot;&quot;; &quot; &lt;&quot; &amp; [.F13] &amp; &quot;&gt;&quot;; &quot;&quot;)" office:value-type="string" office:string-value="9" calcext:value-type="string">
            <text:p>9</text:p>
          </table:table-cell>
          <table:table-cell office:value-type="string" calcext:value-type="string">
            <text:p>USER_NOT_FOU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 tries to return a book that they have not borrowed, or that they have already returned</text:p>
          </table:table-cell>
          <table:table-cell table:number-columns-repeated="2"/>
          <table:table-cell table:formula="of:=[.A14] &amp; IF([.E14]&lt;&gt;&quot;&quot;; &quot; &lt;&quot; &amp; [.E14] &amp; &quot;&gt;&quot;; &quot;&quot;) &amp; IF([.F14]&lt;&gt;&quot;&quot;; &quot; &lt;&quot; &amp; [.F14] &amp; &quot;&gt;&quot;; &quot;&quot;)" office:value-type="string" office:string-value="10" calcext:value-type="string">
            <text:p>10</text:p>
          </table:table-cell>
          <table:table-cell office:value-type="string" calcext:value-type="string">
            <text:p>INVALID_RETURN</text:p>
          </table:table-cell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library</text:p>
          </table:table-cell>
          <table:table-cell table:style-name="ce9" office:value-type="string" calcext:value-type="string">
            <text:p>user</text:p>
          </table:table-cell>
          <table:table-cell table:style-name="ce10" office:value-type="string" calcext:value-type="string">
            <text:p>User tries to return a book to a library that is not the one they borrowed it from</text:p>
          </table:table-cell>
          <table:table-cell table:style-name="ce14"/>
          <table:table-cell table:style-name="ce16"/>
          <table:table-cell table:style-name="ce36" table:formula="of:=[.A15] &amp; IF([.E15]&lt;&gt;&quot;&quot;; &quot; &lt;&quot; &amp; [.E15] &amp; &quot;&gt;&quot;; &quot;&quot;) &amp; IF([.F15]&lt;&gt;&quot;&quot;; &quot; &lt;&quot; &amp; [.F15] &amp; &quot;&gt;&quot;; &quot;&quot;)" office:value-type="string" office:string-value="11" calcext:value-type="string">
            <text:p>11</text:p>
          </table:table-cell>
          <table:table-cell table:style-name="ce20" office:value-type="string" calcext:value-type="string">
            <text:p>WRONG_LIBRARY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nd requests to borrow books from other libraries</text:p>
          </table:table-cell>
          <table:table-cell/>
          <table:table-cell office:value-type="string" calcext:value-type="string">
            <text:p>book_hash</text:p>
          </table:table-cell>
          <table:table-cell table:formula="of:=[.A16] &amp; IF([.E16]&lt;&gt;&quot;&quot;; &quot; &lt;&quot; &amp; [.E16] &amp; &quot;&gt;&quot;; &quot;&quot;) &amp; IF([.F16]&lt;&gt;&quot;&quot;; &quot; &lt;&quot; &amp; [.F16] &amp; &quot;&gt;&quot;; &quot;&quot;)" office:value-type="string" office:string-value="12 &lt;book_hash&gt;" calcext:value-type="string">
            <text:p>12 &lt;book_hash&gt;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Book available: mark te book as unavailable.</text:p>
          </table:table-cell>
          <table:table-cell table:number-columns-repeated="2"/>
          <table:table-cell table:formula="of:=[.A17] &amp; IF([.E17]&lt;&gt;&quot;&quot;; &quot; &lt;&quot; &amp; [.E17] &amp; &quot;&gt;&quot;; &quot;&quot;) &amp; IF([.F17]&lt;&gt;&quot;&quot;; &quot; &lt;&quot; &amp; [.F17] &amp; &quot;&gt;&quot;; &quot;&quot;)" office:value-type="string" office:string-value="13" calcext:value-type="string">
            <text:p>13</text:p>
          </table:table-cell>
          <table:table-cell table:number-columns-repeated="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library</text:p>
          </table:table-cell>
          <table:table-cell table:style-name="ce10" office:value-type="string" calcext:value-type="string">
            <text:p>Book not found in own catalog</text:p>
          </table:table-cell>
          <table:table-cell table:style-name="ce14"/>
          <table:table-cell table:style-name="ce16"/>
          <table:table-cell table:style-name="ce36" table:formula="of:=[.A18] &amp; IF([.E18]&lt;&gt;&quot;&quot;; &quot; &lt;&quot; &amp; [.E18] &amp; &quot;&gt;&quot;; &quot;&quot;) &amp; IF([.F18]&lt;&gt;&quot;&quot;; &quot; &lt;&quot; &amp; [.F18] &amp; &quot;&gt;&quot;; &quot;&quot;)" office:value-type="string" office:string-value="14" calcext:value-type="string">
            <text:p>14</text:p>
          </table:table-cell>
          <table:table-cell table:style-name="ce20" office:value-type="string" calcext:value-type="string">
            <text:p>BOOK_NOT_FOUND_HE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10:52:11.1749266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8:55:52.317672900</meta:creation-date>
    <dc:date>2026-05-25T11:18:21.100347200</dc:date>
    <meta:editing-duration>PT22M17S</meta:editing-duration>
    <meta:editing-cycles>9</meta:editing-cycles>
    <meta:generator>LibreOffice/26.2.3.2$Windows_X86_64 LibreOffice_project/70e089b17412e4cb7773e41413306b17a2328c34</meta:generator>
    <meta:print-date>2026-05-25T10:14:32.198930700</meta:print-date>
    <meta:printed-by>File PDF</meta:printed-by>
    <meta:document-statistic meta:table-count="1" meta:cell-count="98" meta:object-count="0"/>
  </office:meta>
</office:document-meta>
</file>